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4" style:family="paragraph" style:parent-style-name="Quote">
      <style:paragraph-properties fo:text-align="right" style:justify-single-word="false"/>
      <style:text-properties fo:font-style="italic" style:font-style-asian="italic" style:font-style-complex="italic"/>
    </style:style>
    <style:style style:name="P15" style:family="paragraph" style:parent-style-name="Poetry_20_Title" style:master-page-name="Poetry">
      <style:paragraph-properties style:page-number="1" fo:break-before="page"/>
      <style:text-properties fo:font-size="16pt" style:font-size-asian="16pt" style:font-size-complex="16pt"/>
    </style:style>
    <style:style style:name="P16" style:family="paragraph" style:parent-style-name="Text_20_body">
      <style:text-properties officeooo:rsid="001ac331" officeooo:paragraph-rsid="001ac331"/>
    </style:style>
    <style:style style:name="P17" style:family="paragraph" style:parent-style-name="Text_20_body">
      <style:paragraph-properties fo:margin-top="0in" fo:margin-bottom="0.0575in" style:contextual-spacing="false"/>
      <style:text-properties officeooo:rsid="001ac331" officeooo:paragraph-rsid="001ac331"/>
    </style:style>
    <style:style style:name="P18" style:family="paragraph" style:parent-style-name="Poetry_20_Title">
      <style:paragraph-properties fo:break-before="page"/>
    </style:style>
    <style:style style:name="P19" style:family="paragraph" style:parent-style-name="Text_20_body">
      <style:paragraph-properties fo:margin-top="0in" fo:margin-bottom="0.0575in" style:contextual-spacing="false"/>
      <style:text-properties officeooo:rsid="001f49c2" officeooo:paragraph-rsid="001f49c2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1f49c2" officeooo:paragraph-rsid="001f49c2"/>
    </style:style>
    <style:style style:name="P21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1f49c2" officeooo:paragraph-rsid="001f49c2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officeooo:rsid="00190dea"/>
    </style:style>
    <style:style style:name="T4" style:family="text">
      <style:text-properties officeooo:rsid="001ac331"/>
    </style:style>
    <style:style style:name="T5" style:family="text">
      <style:text-properties officeooo:rsid="001f49c2"/>
    </style:style>
    <style:style style:name="T6" style:family="text">
      <style:text-properties officeooo:rsid="00218c29"/>
    </style:style>
    <style:style style:name="T7" style:family="text">
      <style:text-properties officeooo:rsid="00216246"/>
    </style:style>
    <style:style style:name="T8" style:family="text">
      <style:text-properties officeooo:rsid="001fea3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GOODBYE OLLIE<text:span text:style-name="T1">­</text:span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Preface</text:p>
      <text:p text:style-name="P13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4">I aint ever felt better <text:s text:c="67"/>and I aint ever been dumbe<text:span text:style-name="T1">r.</text:span></text:p>
      <text:p text:style-name="Quote">—<text:span text:style-name="T3">Jesse Welles</text:span></text:p>
      <text:p text:style-name="P7"/>
      <text:p text:style-name="P15"><text:bookmark-start text:name="__RefHeading___Toc155_3645116443"/>poetry <text:span text:style-name="T4">title</text:span><text:bookmark-end text:name="__RefHeading___Toc155_3645116443"/></text:p>
      <text:p text:style-name="P16"/>
      <text:p text:style-name="P17">word<text:span text:style-name="T5">s</text:span></text:p>
      <text:p text:style-name="P18">What Have I Done</text:p>
      <text:p text:style-name="P19"/>
      <text:p text:style-name="P20"><text:s text:c="4"/><text:span text:style-name="T6">to o</text:span> <text:s text:c="72"/><text:span text:style-name="T7">m</text:span></text:p>
      <text:p text:style-name="P20"><text:span text:style-name="T6">fa t</text:span> <text:s text:c="5"/><text:span text:style-name="T6">a</text:span> <text:s text:c="66"/><text:span text:style-name="T7">y</text:span></text:p>
      <text:p text:style-name="P20"><text:s text:c="2"/><text:span text:style-name="T6">l</text:span> <text:s text:c="69"/><text:span text:style-name="T7">he <text:s text:c="9"/>l</text:span></text:p>
      <text:p text:style-name="P20"><text:s text:c="4"/><text:span text:style-name="T6">o</text:span> <text:s text:c="71"/><text:span text:style-name="T7">a <text:s text:c="9"/>a</text:span></text:p>
      <text:p text:style-name="P20"><text:s text:c="2"/><text:span text:style-name="T6">a</text:span> <text:s text:c="70"/><text:span text:style-name="T7">r <text:s text:c="11"/>s</text:span></text:p>
      <text:p text:style-name="P20"><text:s text:c="5"/><text:span text:style-name="T6">d</text:span> <text:s text:c="66"/><text:span text:style-name="T7">t <text:s text:c="15"/>t</text:span></text:p>
      <text:p text:style-name="P20"><text:s text:c="56"/><text:span text:style-name="T7">y <text:s/>go <text:s text:c="28"/></text:span><text:span text:style-name="T6">c</text:span></text:p>
      <text:p text:style-name="P20"><text:s text:c="21"/><text:span text:style-name="T7">I</text:span> <text:s text:c="24"/><text:span text:style-name="T7">h <text:s/>m <text:s text:c="10"/>d <text:s text:c="26"/>h</text:span></text:p>
      <text:p text:style-name="P20"><text:s text:c="14"/><text:span text:style-name="T7">e</text:span> <text:s text:c="8"/><text:span text:style-name="T7">od</text:span> <text:s/><text:span text:style-name="T7">t</text:span> <text:s text:c="12"/><text:span text:style-name="T7">o <text:s text:c="43"/>a hn</text:span></text:p>
      <text:p text:style-name="P20"><text:s text:c="12"/><text:span text:style-name="T7">ev</text:span> <text:s text:c="17"/><text:span text:style-name="T7">ah</text:span> <text:s text:c="33"/><text:span text:style-name="T7">I <text:s text:c="20"/>c <text:s/>e</text:span></text:p>
      <text:p text:style-name="P20"><text:s text:c="9"/><text:span text:style-name="T7">n</text:span> <text:s text:c="24"/><text:span text:style-name="T7">w</text:span> <text:s text:c="33"/><text:span text:style-name="T7">ca</text:span></text:p>
      <text:p text:style-name="P21"><text:s text:c="5"/><text:span text:style-name="T7">sa</text:span> <text:s text:c="32"/>w <text:s text:c="29"/><text:span text:style-name="T7">n</text:span></text:p>
      <text:p text:style-name="P21"><text:s text:c="9"/><text:span text:style-name="T7">y</text:span> <text:s text:c="29"/>e <text:s text:c="37"/><text:span text:style-name="T7">t</text:span></text:p>
      <text:p text:style-name="P21"><text:s text:c="40"/></text:p>
      <text:p text:style-name="P21"><text:s text:c="41"/>t <text:s text:c="34"/><text:span text:style-name="T7">fe</text:span></text:p>
      <text:p text:style-name="P21"><text:s text:c="43"/>a <text:s text:c="35"/><text:span text:style-name="T7">el m</text:span></text:p>
      <text:p text:style-name="P21"><text:s text:c="45"/>n <text:s text:c="36"/><text:span text:style-name="T7">y l</text:span></text:p>
      <text:p text:style-name="P21"><text:s text:c="44"/>d <text:s text:c="38"/><text:span text:style-name="T7">e</text:span></text:p>
      <text:p text:style-name="P21"><text:s text:c="45"/>d <text:s text:c="37"/><text:span text:style-name="T7">g</text:span></text:p>
      <text:p text:style-name="P21"><text:s text:c="44"/>r</text:p>
      <text:p text:style-name="P21"><text:s text:c="45"/>i</text:p>
      <text:p text:style-name="P21"><text:s text:c="46"/>pi n</text:p>
      <text:p text:style-name="P21"><text:s text:c="50"/>g d o</text:p>
      <text:p text:style-name="P21"><text:s text:c="41"/><text:span text:style-name="T7">o</text:span> <text:s text:c="11"/>w</text:p>
      <text:p text:style-name="P21"><text:s text:c="37"/><text:span text:style-name="T7">n</text:span> <text:s text:c="16"/>n th e</text:p>
      <text:p text:style-name="P21"><text:s text:c="29"/><text:span text:style-name="T7">to</text:span> <text:s text:c="29"/>p</text:p>
      <text:p text:style-name="P21"><text:s text:c="23"/><text:span text:style-name="T7">th</text:span> <text:s text:c="34"/>a <text:s/>g</text:p>
      <text:p text:style-name="P21"><text:s text:c="22"/><text:span text:style-name="T7">e</text:span> <text:s text:c="35"/>e <text:s text:c="7"/><text:span text:style-name="T8">a <text:s text:c="4"/>t <text:s text:c="5"/>s e <text:s text:c="2"/>e</text:span></text:p>
      <text:p text:style-name="P21"><text:s text:c="16"/><text:span text:style-name="T7">flo <text:s/>or</text:span> <text:s text:c="26"/><text:span text:style-name="T8">f or <text:s text:c="7"/>l <text:s text:c="2"/>l <text:s text:c="4"/>o <text:s text:c="5"/>m y <text:s text:c="2"/>sh a <text:s/>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6"/><text:bookmark text:name="PageNumWizard_HEADER_Frontmatter-numbered5 Copy 5 Copy 4"/><text:bookmark text:name="PageNumWizard_HEADER_Frontmatter-numbered5 Copy 5 Copy 2"/><text:bookmark text:name="PageNumWizard_HEADER_Frontmatter-numbered6 Copy 5"/><text:bookmark text:name="PageNumWizard_HEADER_Frontmatter-numbered5 Copy 5 Copy 1"/><text:bookmark text:name="PageNumWizard_HEADER_Frontmatter-numbered5 Copy 5 Copy 3"/><text:bookmark text:name="PageNumWizard_HEADER_Frontmatter-numbered5 Copy 5 Copy 5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3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2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07T20:08:27.034490000</dc:date>
    <meta:editing-duration>PT44M18S</meta:editing-duration>
    <meta:editing-cycles>11</meta:editing-cycles>
    <meta:generator>LibreOffice/26.2.3.2$MacOSX_AARCH64 LibreOffice_project/70e089b17412e4cb7773e41413306b17a2328c34</meta:generator>
    <meta:document-statistic meta:table-count="0" meta:image-count="0" meta:object-count="0" meta:page-count="12" meta:paragraph-count="45" meta:word-count="139" meta:character-count="2466" meta:non-whitespace-character-count="308"/>
  </office:meta>
</office:document-meta>
</file>